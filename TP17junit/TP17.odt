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810f" officeooo:paragraph-rsid="0000810f"/>
    </style:style>
    <style:style style:name="P2" style:family="paragraph" style:parent-style-name="Standard">
      <style:text-properties officeooo:rsid="00035dbb" officeooo:paragraph-rsid="00035dbb"/>
    </style:style>
    <style:style style:name="T1" style:family="text">
      <style:text-properties officeooo:rsid="00006563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2.1) </text:span></text:p>
      <text:p text:style-name="Standard"><text:span text:style-name="Source_20_Text"><text:span text:style-name="T4">getMethods()</text:span></text:span><text:span text:style-name="T4"> retourne toutes les méthodes </text:span><text:span text:style-name="Strong_20_Emphasis"><text:span text:style-name="T4">publiques</text:span></text:span><text:span text:style-name="T4">, y compris celles </text:span><text:span text:style-name="Strong_20_Emphasis"><text:span text:style-name="T4">héritées</text:span></text:span><text:span text:style-name="T4"> des superclasses. </text:span><text:span text:style-name="Source_20_Text"><text:span text:style-name="T4">getDeclaredMethods()</text:span></text:span><text:span text:style-name="T4"> retourne toutes les méthodes déclarées dans la classe mais </text:span><text:span text:style-name="Strong_20_Emphasis"><text:span text:style-name="T4">pas les héritées</text:span></text:span><text:span text:style-name="T4">.</text:span></text:p>
      <text:p text:style-name="P1">→ Donc getMethods() sera la bonne solution ici</text:p>
      <text:p text:style-name="P1"/>
      <text:p text:style-name="P2">2.2)</text:p>
      <text:p text:style-name="P2"/>
      <text:p text:style-name="P2"><text:span text:style-name="T2">Si </text:span><text:span text:style-name="Source_20_Text"><text:span text:style-name="T2">nettoyer</text:span></text:span><text:span text:style-name="T2"> ou </text:span><text:span text:style-name="Source_20_Text"><text:span text:style-name="T2">preparer</text:span></text:span><text:span text:style-name="T2"> n'existent pas dans la classe, </text:span><text:span text:style-name="Source_20_Text"><text:span text:style-name="T2">getMethod()</text:span></text:span><text:span text:style-name="T2"> lève une « </text:span><text:span text:style-name="Source_20_Text"><text:span text:style-name="T2">NoSuchMethodException »</text:span></text:span><text:span text:style-name="T2">. </text:span></text:p>
      <text:p text:style-name="P2"><text:span text:style-name="T2">→ Il faut donc attraper cette exception et laisser la variable à </text:span><text:span text:style-name="Source_20_Text"><text:span text:style-name="T2">null</text:span></text:span><text:span text:style-name="T2">, puis vérifier </text:span><text:span text:style-name="Source_20_Text"><text:span text:style-name="T2">if (nettoyer != null)</text:span></text:span><text:span text:style-name="T2"> avant de l'appeler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is Caro</meta:initial-creator>
    <meta:creation-date>2026-04-03T15:46:29.141000000</meta:creation-date>
    <dc:date>2026-04-03T15:52:56.011000000</dc:date>
    <dc:creator>Loris Caro</dc:creator>
    <meta:editing-duration>PT6M25S</meta:editing-duration>
    <meta:editing-cycles>5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6" meta:word-count="72" meta:character-count="479" meta:non-whitespace-character-count="410"/>
  </office:meta>
</office:document-meta>
</file>